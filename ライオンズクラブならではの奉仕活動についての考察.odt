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ライオンズクラブならではの奉仕活動についての考察</text:h>
      <text:h text:style-name="Heading_20_3" text:outline-level="3">地域小規模団体との構造的な違い</text:h>
      <text:p text:style-name="Text_20_body">ライオンズクラブが地域の清掃ボランティア団体などと決定的に異なるのは、国際的なネットワーク、組織的な資金調達力、そして行政・専門機関との連携チャンネルを持っている点です。地域の清掃団体は「自分たちの手が届く範囲を、自分たちの労力で」という活動が中心になりますが、ライオンズクラブは資金・人脈・組織間連携を動員することで、個人の労力だけでは解決できない課題に取り組めます。</text:p>
      <text:p text:style-name="Text_20_body">具体的には、地域清掃団体が「公園のゴミ拾い」を行うのに対し、ライオンズクラブは「なぜその公園が荒れるのか」という上流の課題、つまり啓発・仕組みづくり・設備整備への働きかけまで射程に入れられるという違いがあります。</text:p>
      <text:h text:style-name="Heading_20_3" text:outline-level="3">ライオンズクラブならではの奉仕活動：具体例３つ</text:h>
      <text:h text:style-name="Heading_20_4" text:outline-level="4">1. 視覚障害者支援の地域包括プログラム</text:h>
      <text:p text:style-name="Text_20_body">ライオンズクラブ国際協会は歴史的に視覚支援を重点分野としており、これは他の地域団体にはない明確な強みです。</text:p>
      <text:p text:style-name="Text_20_body">たとえば、地域の眼科医会と連携して小中学校での無料視力スクリーニングを実施し、要精密検査の児童には受診費用を基金から補助する、さらに結果データを自治体の健康施策に反映させるよう提言するといった活動が考えられます。地域の清掃団体がこうした医療専門職との連携や基金運用を行うのは現実的に困難であり、組織的な信用と資金力を持つライオンズクラブだからこそ成立する活動です。</text:p>
      <text:h text:style-name="Heading_20_4" text:outline-level="4">2. 災害備蓄・防災ネットワークの広域整備</text:h>
      <text:p text:style-name="Text_20_body">地域団体が行う防災活動は、自治会単位の防災訓練や備蓄確認にとどまることが多いですが、ライオンズクラブは複数クラブの地区（ディストリクト）単位で動ける点が異なります。</text:p>
      <text:p text:style-name="Text_20_body">具体的には、同一地区内の複数クラブが連携して、各地域の避難所に統一規格の防災備蓄セットを整備・定期更新する仕組みを構築するような活動です。備蓄品の調達は組織的な購買力でコストを抑え、更新管理は各クラブが担当地域を分担します。さらに、被災時には地区を超えた他クラブからの物資支援ルートが確保されている点は、単独の地域団体では実現しにくい広域的な安全保障になります。</text:p>
      <text:h text:style-name="Heading_20_4" text:outline-level="4">3. 青少年育成と国際交流を組み合わせたリーダーシップ事業</text:h>
      <text:p text:style-name="Text_20_body">ライオンズクラブにはレオクラブ（青少年組織）や国際YCE（青少年交換）といった既存の枠組みがあり、これを活用した活動は他団体との差別化が最も明確です。</text:p>
      <text:p text:style-name="Text_20_body">たとえば、地域の高校生を対象に「地域課題を英語でプレゼンテーションする」プログラムを企画し、優秀者を海外のライオンズクラブとの交流事業に派遣するといった形です。地域課題への当事者意識、語学力、国際感覚を同時に育成できます。地域の清掃団体が国際交流の受け皿を持つことはまずないため、この「ローカルな課題意識とグローバルな視野を接続する」活動はライオンズクラブの組織構造そのものを活かした事業といえます。</text:p>
      <text:p text:style-name="Horizontal_20_Line"/>
      <text:p text:style-name="Text_20_body">要するに、ライオンズクラブの強みは「自分たちの手を動かす」ことよりも、「資金・専門家・広域ネットワーク・国際的な枠組みを組み合わせて、地域団体だけでは届かない課題に仕組みとして取り組める」点にあります。逆に言えば、地域の清掃活動のような「目の前のことを住民の手で」という活動は、むしろ小規模団体の方が機動的に行えるため、ライオンズクラブとしてはそこと競合するのではなく、補完関係を意識した活動設計が重要です。</text:p>
      <text:p text:style-name="Standard"/>
      <text:p text:style-name="Standard"/>
      <text:p text:style-name="Standard"/>
      <text:p text:style-name="Standard"/>
      <text:p text:style-name="Standard"/>
      <text:p text:style-name="Text_20_body"><text:soft-page-break/>日本が現在直面している主な社会課題を20個挙げます。</text:p>
      <text:list xml:id="list2170465129" text:style-name="L1">
        <text:list-item>
          <text:p text:style-name="P2"><text:span text:style-name="Strong_20_Emphasis">少子化</text:span> — 出生率の低下が続き、2023年の合計特殊出生率は過去最低を更新。社会の持続可能性に直結する問題です。 </text:p>
        </text:list-item>
        <text:list-item>
          <text:p text:style-name="P2"><text:span text:style-name="Strong_20_Emphasis">高齢化と介護人材不足</text:span> — 超高齢社会における介護の担い手が慢性的に不足しており、家族介護者の負担も深刻です。 </text:p>
        </text:list-item>
        <text:list-item>
          <text:p text:style-name="P2"><text:span text:style-name="Strong_20_Emphasis">孤独・孤立問題</text:span> — 高齢者の一人暮らし増加に加え、若年層の孤立も社会問題化しています。 </text:p>
        </text:list-item>
        <text:list-item>
          <text:p text:style-name="P2"><text:span text:style-name="Strong_20_Emphasis">子どもの貧困</text:span> — 相対的貧困率が先進国の中でも高く、教育機会や食事の格差につながっています。 </text:p>
        </text:list-item>
        <text:list-item>
          <text:p text:style-name="P2"><text:span text:style-name="Strong_20_Emphasis">ヤングケアラー</text:span> — 家族の介護や世話を担う若者・子どもが学業や社会参加の機会を失っています。 </text:p>
        </text:list-item>
        <text:list-item>
          <text:p text:style-name="P2"><text:span text:style-name="Strong_20_Emphasis">災害対策と防災</text:span> — 地震・台風・豪雨などの自然災害リスクが高く、地域防災力の強化が求められています。 </text:p>
        </text:list-item>
        <text:list-item>
          <text:p text:style-name="P2"><text:span text:style-name="Strong_20_Emphasis">空き家問題</text:span> — 全国で空き家が増加し、地域の安全・景観・衛生面での課題となっています。 </text:p>
        </text:list-item>
        <text:list-item>
          <text:p text:style-name="P2"><text:span text:style-name="Strong_20_Emphasis">地方の過疎化</text:span> — 若者の都市部流出により、地方の経済・医療・教育インフラの維持が困難になっています。 </text:p>
        </text:list-item>
        <text:list-item>
          <text:p text:style-name="P2"><text:span text:style-name="Strong_20_Emphasis">フードロス（食品廃棄）</text:span> — 年間数百万トンの食品が廃棄される一方、食料支援を必要とする人々が存在します。 </text:p>
        </text:list-item>
        <text:list-item>
          <text:p text:style-name="P2"><text:span text:style-name="Strong_20_Emphasis">不登校の増加</text:span> — 小中学校の不登校児童生徒数が過去最多を更新し続けており、学びの場の多様化が求められています。 </text:p>
        </text:list-item>
        <text:list-item>
          <text:p text:style-name="P2"><text:span text:style-name="Strong_20_Emphasis">自殺問題</text:span> — 特に若年層の自殺率が高く、メンタルヘルス支援の充実が急務です。 </text:p>
        </text:list-item>
        <text:list-item>
          <text:p text:style-name="P2"><text:span text:style-name="Strong_20_Emphasis">外国人住民との共生</text:span> — 在留外国人の増加に伴い、言語・生活・教育面でのサポート体制の整備が必要です。 </text:p>
        </text:list-item>
        <text:list-item>
          <text:p text:style-name="P2"><text:span text:style-name="Strong_20_Emphasis">認知症対策</text:span> — 認知症高齢者の増加に対し、早期発見・地域での見守り・家族支援が課題です。 </text:p>
        </text:list-item>
        <text:list-item>
          <text:p text:style-name="P2"><text:span text:style-name="Strong_20_Emphasis">デジタルデバイド</text:span> — 高齢者を中心にデジタル技術を使いこなせない層が行政サービス等から取り残される懸念があります。 </text:p>
        </text:list-item>
        <text:list-item>
          <text:p text:style-name="P2"><text:span text:style-name="Strong_20_Emphasis">障がい者の社会参加</text:span> — 就労・移動・情報アクセスなどにおけるバリアフリーの推進が引き続き必要です。 </text:p>
        </text:list-item>
        <text:list-item>
          <text:p text:style-name="P2"><text:span text:style-name="Strong_20_Emphasis">環境問題・脱炭素</text:span> — 気候変動への対応、プラスチックごみ削減、地域レベルでの環境保全活動が求められています。 </text:p>
        </text:list-item>
        <text:list-item>
          <text:p text:style-name="P2"><text:span text:style-name="Strong_20_Emphasis">DV・虐待</text:span> — 家庭内暴力や児童虐待の相談件数は増加傾向にあり、早期発見と被害者支援が重要です。 </text:p>
        </text:list-item>
        <text:list-item>
          <text:p text:style-name="P2"><text:span text:style-name="Strong_20_Emphasis">ひきこもり</text:span> — 若年層だけでなく中高年のひきこもりも増加し、「8050問題」として深刻化しています。 </text:p>
        </text:list-item>
        <text:list-item>
          <text:p text:style-name="P2"><text:span text:style-name="Strong_20_Emphasis">交通弱者問題</text:span> — 地方での公共交通の縮小により、高齢者や免許返納者の移動手段が失われています。 </text:p>
        </text:list-item>
        <text:list-item>
          <text:p text:style-name="P1"><text:span text:style-name="Strong_20_Emphasis">視覚・健康リテラシーの格差</text:span> — 生活習慣病の予防や健康診断の受診率に地域・世代間で差があり、啓発活動の必要性が高いです。</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ＭＳ 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明朝" style:font-size-asian="10.5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ゴシック" style:font-family-asian="'ＭＳ 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ＭＳ 明朝" style:font-family-asian="'ＭＳ 明朝'"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ＭＳ 明朝" style:font-family-asian="'ＭＳ 明朝'"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ＭＳ 明朝" style:font-family-asian="'ＭＳ 明朝'"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5-09T09:19:43.880000000</meta:creation-date>
    <dc:date>2026-05-09T09:21:42.085000000</dc:date>
    <meta:editing-duration>PT1M58S</meta:editing-duration>
    <meta:editing-cycles>2</meta:editing-cycles>
    <meta:generator>Trio_Office/6.2.8.2$Windows_x86 LibreOffice_project/</meta:generator>
    <meta:document-statistic meta:table-count="0" meta:image-count="0" meta:object-count="0" meta:page-count="2" meta:paragraph-count="36" meta:word-count="2362" meta:character-count="2488" meta:non-whitespace-character-count="2426"/>
  </office:meta>
</office:document-meta>
</file>